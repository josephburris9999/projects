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E7000000A8E84A4D84.png" manifest:media-type="image/png"/>
  <manifest:file-entry manifest:full-path="Pictures/1000000100000386000001812D1F8072.png" manifest:media-type="image/png"/>
  <manifest:file-entry manifest:full-path="Pictures/10000001000002230000027828B69CB9.png" manifest:media-type="image/png"/>
  <manifest:file-entry manifest:full-path="Pictures/10000001000003840000017F8B67BA0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4.125in"/>
    </style:style>
    <style:style style:name="Table1.B" style:family="table-column">
      <style:table-column-properties style:column-width="2.8021in"/>
    </style:style>
    <style:style style:name="Table1.1" style:family="table-row">
      <style:table-row-properties style:min-row-height="1.8125in"/>
    </style:style>
    <style:style style:name="Table1.A1" style:family="table-cell">
      <style:table-cell-properties fo:padding="0.0382in" fo:border="none"/>
    </style:style>
    <style:style style:name="P1" style:family="paragraph" style:parent-style-name="Text_20_body">
      <style:text-properties officeooo:paragraph-rsid="00343b68"/>
    </style:style>
    <style:style style:name="P2" style:family="paragraph" style:parent-style-name="Standard">
      <style:text-properties fo:color="#7f0055" loext:opacity="100%" style:font-name="Noto Mono" fo:font-size="10pt" fo:font-weight="bold" officeooo:rsid="00198867" officeooo:paragraph-rsid="00198867" style:font-size-asian="10pt" style:font-weight-asian="bold" style:font-size-complex="10pt"/>
    </style:style>
    <style:style style:name="P3" style:family="paragraph" style:parent-style-name="Standard">
      <style:text-properties fo:font-size="10pt" officeooo:rsid="00198867" officeooo:paragraph-rsid="00198867" style:font-size-asian="10pt" style:font-size-complex="10pt"/>
    </style:style>
    <style:style style:name="P4" style:family="paragraph" style:parent-style-name="Standard">
      <style:paragraph-properties fo:margin-left="0in" fo:margin-right="0in" fo:text-align="left" style:justify-single-word="false" fo:text-indent="0in" style:auto-text-indent="false"/>
      <style:text-properties style:font-name="Noto Mono" fo:font-size="10pt" style:font-size-asian="10pt" style:font-size-complex="10pt"/>
    </style:style>
    <style:style style:name="P5" style:family="paragraph" style:parent-style-name="Standard">
      <style:paragraph-properties fo:margin-left="0in" fo:margin-right="0in" fo:text-align="left" style:justify-single-word="false" fo:text-indent="0in" style:auto-text-indent="false"/>
      <style:text-properties fo:font-size="10pt" style:font-size-asian="10pt" style:font-size-complex="10pt"/>
    </style:style>
    <style:style style:name="P6" style:family="paragraph" style:parent-style-name="Standard">
      <style:paragraph-properties fo:margin-left="0in" fo:margin-right="0in" fo:text-align="left" style:justify-single-word="false" fo:text-indent="0in" style:auto-text-indent="false"/>
      <style:text-properties fo:color="#000000" loext:opacity="100%" style:font-name="Noto Mono" fo:font-size="10pt" style:font-size-asian="10pt" style:font-size-complex="10pt"/>
    </style:style>
    <style:style style:name="P7" style:family="paragraph" style:parent-style-name="Standard">
      <style:text-properties fo:color="#7f0055" loext:opacity="100%" style:font-name="Noto Mono" fo:font-size="10pt" fo:font-weight="bold" officeooo:paragraph-rsid="00198867" style:font-size-asian="10pt" style:font-weight-asian="bold" style:font-size-complex="10pt"/>
    </style:style>
    <style:style style:name="P8" style:family="paragraph" style:parent-style-name="Standard">
      <style:text-properties fo:font-size="10pt" officeooo:paragraph-rsid="00198867" style:font-size-asian="10pt" style:font-size-complex="10pt"/>
    </style:style>
    <style:style style:name="P9" style:family="paragraph" style:parent-style-name="Standard">
      <style:paragraph-properties fo:margin-left="0in" fo:margin-right="0in" fo:text-align="left" style:justify-single-word="false" fo:text-indent="0in" style:auto-text-indent="false"/>
      <style:text-properties fo:color="#646464" loext:opacity="100%" style:font-name="Noto Mono" fo:font-size="10pt" style:font-size-asian="10pt" style:font-size-complex="10pt"/>
    </style:style>
    <style:style style:name="P10" style:family="paragraph" style:parent-style-name="Standard">
      <style:paragraph-properties fo:margin-left="0in" fo:margin-right="0in" fo:text-align="left" style:justify-single-word="false" fo:text-indent="0in" style:auto-text-indent="false"/>
      <style:text-properties officeooo:paragraph-rsid="00318bc7"/>
    </style:style>
    <style:style style:name="P11" style:family="paragraph" style:parent-style-name="Standard">
      <style:text-properties fo:color="#646464" loext:opacity="100%" style:font-name="Noto Mono" fo:font-size="10pt" officeooo:rsid="0019d5ec" officeooo:paragraph-rsid="0019d5ec" style:font-size-asian="10pt" style:font-size-complex="10pt"/>
    </style:style>
    <style:style style:name="P12" style:family="paragraph" style:parent-style-name="Standard">
      <style:text-properties fo:color="#000000" loext:opacity="100%" style:font-name="Noto Mono" fo:font-size="10pt" officeooo:rsid="0019d5ec" officeooo:paragraph-rsid="0019d5ec" style:font-size-asian="10pt" style:font-size-complex="10pt"/>
    </style:style>
    <style:style style:name="P13" style:family="paragraph" style:parent-style-name="Heading_20_3">
      <style:text-properties officeooo:paragraph-rsid="00343b68"/>
    </style:style>
    <style:style style:name="P14" style:family="paragraph" style:parent-style-name="Text_20_body">
      <style:paragraph-properties>
        <style:tab-stops>
          <style:tab-stop style:position="6.5626in"/>
        </style:tab-stops>
      </style:paragraph-properties>
      <style:text-properties officeooo:paragraph-rsid="00343b68"/>
    </style:style>
    <style:style style:name="P15" style:family="paragraph" style:parent-style-name="Text_20_body">
      <style:text-properties officeooo:paragraph-rsid="0026f1c8"/>
    </style:style>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1">
      <style:paragraph-properties fo:margin-top="0in" fo:margin-bottom="0in" style:contextual-spacing="false"/>
      <style:text-properties officeooo:paragraph-rsid="00343b68"/>
    </style:style>
    <style:style style:name="P18" style:family="paragraph" style:parent-style-name="Text_20_body" style:list-style-name="L1">
      <style:paragraph-properties fo:margin-top="0in" fo:margin-bottom="0in" style:contextual-spacing="false"/>
      <style:text-properties officeooo:paragraph-rsid="0025eac4"/>
    </style:style>
    <style:style style:name="P19" style:family="paragraph" style:parent-style-name="Standard">
      <style:text-properties officeooo:rsid="00248b94" officeooo:paragraph-rsid="0024d8fd"/>
    </style:style>
    <style:style style:name="P20" style:family="paragraph" style:parent-style-name="Heading">
      <style:text-properties officeooo:rsid="0025eac4" officeooo:paragraph-rsid="0025eac4"/>
    </style:style>
    <style:style style:name="P21" style:family="paragraph" style:parent-style-name="Text_20_body">
      <style:text-properties officeooo:paragraph-rsid="00244c4d"/>
    </style:style>
    <style:style style:name="P22" style:family="paragraph" style:parent-style-name="Text_20_body" style:list-style-name="L2"/>
    <style:style style:name="P23" style:family="paragraph" style:parent-style-name="Text_20_body" style:list-style-name="L2">
      <style:text-properties officeooo:paragraph-rsid="0026f1c8"/>
    </style:style>
    <style:style style:name="P24" style:family="paragraph" style:parent-style-name="Text_20_body" style:list-style-name="L2">
      <style:paragraph-properties fo:margin-top="0in" fo:margin-bottom="0in" style:contextual-spacing="false"/>
      <style:text-properties officeooo:rsid="0026f1c8" officeooo:paragraph-rsid="0026f1c8"/>
    </style:style>
    <style:style style:name="P25" style:family="paragraph" style:parent-style-name="Text_20_body" style:list-style-name="L2">
      <style:paragraph-properties fo:margin-top="0in" fo:margin-bottom="0in" style:contextual-spacing="false"/>
      <style:text-properties officeooo:paragraph-rsid="0026f1c8"/>
    </style:style>
    <style:style style:name="P26" style:family="paragraph" style:parent-style-name="Text_20_body">
      <style:paragraph-properties fo:margin-top="0in" fo:margin-bottom="0in" style:contextual-spacing="false"/>
      <style:text-properties officeooo:rsid="0026f1c8" officeooo:paragraph-rsid="0026f1c8"/>
    </style:style>
    <style:style style:name="P27" style:family="paragraph" style:parent-style-name="Standard">
      <style:paragraph-properties fo:margin-left="0in" fo:margin-right="0in" fo:text-align="left" style:justify-single-word="false" fo:text-indent="0in" style:auto-text-indent="false"/>
      <style:text-properties fo:font-size="10pt" fo:background-color="#ffff00" style:font-size-asian="10pt" style:font-size-complex="10pt"/>
    </style:style>
    <style:style style:name="P28" style:family="paragraph" style:parent-style-name="Standard">
      <style:paragraph-properties fo:margin-left="0in" fo:margin-right="0in" fo:text-align="left" style:justify-single-word="false" fo:text-indent="0in" style:auto-text-indent="false"/>
      <style:text-properties fo:font-size="10pt" officeooo:paragraph-rsid="0028f06f" fo:background-color="#ffff00" style:font-size-asian="10pt" style:font-size-complex="10pt"/>
    </style:style>
    <style:style style:name="P29" style:family="paragraph" style:parent-style-name="Standard">
      <style:paragraph-properties fo:margin-left="0in" fo:margin-right="0in" fo:text-align="left" style:justify-single-word="false" fo:text-indent="0in" style:auto-text-indent="false"/>
    </style:style>
    <style:style style:name="P30" style:family="paragraph" style:parent-style-name="Text_20_body">
      <style:paragraph-properties>
        <style:tab-stops>
          <style:tab-stop style:position="6.5626in"/>
        </style:tab-stops>
      </style:paragraph-properties>
      <style:text-properties fo:font-weight="bold" officeooo:rsid="00343b68" officeooo:paragraph-rsid="00343b68" style:font-weight-asian="bold" style:font-weight-complex="bold"/>
    </style:style>
    <style:style style:name="P31" style:family="paragraph" style:parent-style-name="Heading_20_3">
      <style:paragraph-properties fo:break-before="page"/>
      <style:text-properties officeooo:paragraph-rsid="00343b68"/>
    </style:style>
    <style:style style:name="P32" style:family="paragraph" style:parent-style-name="Text_20_body" style:list-style-name="L3">
      <style:paragraph-properties fo:margin-top="0in" fo:margin-bottom="0.0402in" style:contextual-spacing="false"/>
      <style:text-properties officeooo:paragraph-rsid="00343b68"/>
    </style:style>
    <style:style style:name="P33" style:family="paragraph" style:parent-style-name="Text_20_body">
      <style:paragraph-properties fo:margin-top="0in" fo:margin-bottom="0.0402in" style:contextual-spacing="false"/>
      <style:text-properties officeooo:paragraph-rsid="0035a38b"/>
    </style:style>
    <style:style style:name="T1" style:family="text">
      <style:text-properties officeooo:rsid="001556ab"/>
    </style:style>
    <style:style style:name="T2" style:family="text">
      <style:text-properties officeooo:rsid="0017e0a0"/>
    </style:style>
    <style:style style:name="T3" style:family="text">
      <style:text-properties officeooo:rsid="00198867"/>
    </style:style>
    <style:style style:name="T4" style:family="text">
      <style:text-properties officeooo:rsid="0015c090"/>
    </style:style>
    <style:style style:name="T5" style:family="text">
      <style:text-properties officeooo:rsid="003b340f"/>
    </style:style>
    <style:style style:name="T6" style:family="text">
      <style:text-properties officeooo:rsid="0025eac4"/>
    </style:style>
    <style:style style:name="T7" style:family="text">
      <style:text-properties officeooo:rsid="0022ead9"/>
    </style:style>
    <style:style style:name="T8" style:family="text">
      <style:text-properties fo:color="#7f0055" loext:opacity="100%" style:font-name="Noto Mono" fo:font-weight="bold" style:font-weight-asian="bold"/>
    </style:style>
    <style:style style:name="T9" style:family="text">
      <style:text-properties fo:color="#000000" loext:opacity="100%" style:font-name="Noto Mono"/>
    </style:style>
    <style:style style:name="T10" style:family="text">
      <style:text-properties fo:color="#000000" loext:opacity="100%" style:font-name="Noto Mono" officeooo:rsid="002d3276"/>
    </style:style>
    <style:style style:name="T11" style:family="text">
      <style:text-properties fo:color="#000000" loext:opacity="100%" style:font-name="Noto Mono" officeooo:rsid="003b340f"/>
    </style:style>
    <style:style style:name="T12" style:family="text">
      <style:text-properties fo:color="#0000c0" loext:opacity="100%" style:font-name="Noto Mono" fo:font-style="italic" fo:font-weight="bold" style:font-style-asian="italic" style:font-weight-asian="bold"/>
    </style:style>
    <style:style style:name="T13" style:family="text">
      <style:text-properties fo:color="#6a3e3e" loext:opacity="100%" style:font-name="Noto Mono"/>
    </style:style>
    <style:style style:name="T14" style:family="text">
      <style:text-properties fo:color="#3f7f5f" loext:opacity="100%" style:font-name="Noto Mono"/>
    </style:style>
    <style:style style:name="T15" style:family="text">
      <style:text-properties fo:color="#7f9fbf" loext:opacity="100%" style:font-name="Noto Mono" fo:font-weight="bold" style:font-weight-asian="bold"/>
    </style:style>
    <style:style style:name="T16" style:family="text">
      <style:text-properties fo:color="#646464" loext:opacity="100%" style:font-name="Noto Mono"/>
    </style:style>
    <style:style style:name="T17" style:family="text">
      <style:text-properties officeooo:rsid="0019d5ec"/>
    </style:style>
    <style:style style:name="T18" style:family="text">
      <style:text-properties fo:color="#7f0055" loext:opacity="100%" style:font-name="Noto Mono" fo:font-weight="bold" fo:background-color="#ffff00" loext:char-shading-value="0" style:font-weight-asian="bold"/>
    </style:style>
    <style:style style:name="T19" style:family="text">
      <style:text-properties fo:color="#000000" loext:opacity="100%" style:font-name="Noto Mono" fo:background-color="#ffff00" loext:char-shading-value="0"/>
    </style:style>
    <style:style style:name="T20" style:family="text">
      <style:text-properties fo:color="#6a3e3e" loext:opacity="100%" style:font-name="Noto Mono" fo:background-color="#ffff00" loext:char-shading-value="0"/>
    </style:style>
    <style:style style:name="T21" style:family="text">
      <style:text-properties fo:color="#000000" loext:opacity="100%" style:font-name="Noto Mono" fo:font-size="10pt" fo:background-color="transparent" loext:char-shading-value="0" style:font-size-asian="10pt" style:font-size-complex="10pt"/>
    </style:style>
    <style:style style:name="T22" style:family="text">
      <style:text-properties fo:color="#6a3e3e" loext:opacity="100%" style:font-name="Noto Mono" fo:font-size="10pt" fo:background-color="#ffff00" loext:char-shading-value="0" style:font-size-asian="10pt" style:font-size-complex="10pt"/>
    </style:style>
    <style:style style:name="T23" style:family="text">
      <style:text-properties fo:color="#000000" loext:opacity="100%" style:font-name="Noto Mono" fo:font-size="10pt" fo:background-color="#ffff00" loext:char-shading-value="0" style:font-size-asian="10pt" style:font-size-complex="10pt"/>
    </style:style>
    <style:style style:name="T24" style:family="text">
      <style:text-properties fo:color="#2a00ff" loext:opacity="100%" style:font-name="Noto Mono" fo:font-size="10pt" fo:background-color="#ffff00" loext:char-shading-value="0" style:font-size-asian="10pt" style:font-size-complex="10pt"/>
    </style:style>
    <style:style style:name="T25" style:family="text">
      <style:text-properties fo:color="#2a00ff" loext:opacity="100%" style:font-name="Noto Mono" fo:font-size="10pt" officeooo:rsid="00318bc7" fo:background-color="#ffff00" loext:char-shading-value="0" style:font-size-asian="10pt" style:font-size-complex="10pt"/>
    </style:style>
    <style:style style:name="T26" style:family="text">
      <style:text-properties fo:color="#3f7f5f" loext:opacity="100%" style:font-name="Noto Mono" fo:font-size="10pt" fo:background-color="#ffff00" loext:char-shading-value="0" style:font-size-asian="10pt" style:font-size-complex="10pt"/>
    </style:style>
    <style:style style:name="T27" style:family="text">
      <style:text-properties fo:color="#7f9fbf" loext:opacity="100%" style:font-name="Noto Mono" fo:font-size="10pt" fo:font-weight="bold" officeooo:rsid="00318bc7" fo:background-color="#ffff00" loext:char-shading-value="0" style:font-size-asian="10pt" style:font-weight-asian="bold" style:font-size-complex="10pt"/>
    </style:style>
    <style:style style:name="T28" style:family="text">
      <style:text-properties fo:color="#000000" loext:opacity="100%" style:font-name="Noto Mono" fo:font-style="italic" fo:background-color="#ffff00" loext:char-shading-value="0" style:font-style-asian="italic"/>
    </style:style>
    <style:style style:name="T29" style:family="text">
      <style:text-properties fo:color="#0000c0" loext:opacity="100%" style:font-name="Noto Mono" fo:font-style="italic" fo:font-weight="bold" fo:background-color="#ffff00" loext:char-shading-value="0" style:font-style-asian="italic" style:font-weight-asian="bold"/>
    </style:style>
    <style:style style:name="T30" style:family="text">
      <style:text-properties officeooo:rsid="00343b68"/>
    </style:style>
    <style:style style:name="T31" style:family="text">
      <style:text-properties style:font-name="Liberation Sans" fo:font-size="14.1000003814697pt" fo:font-weight="bold" officeooo:rsid="00343b68" style:font-name-asian="Noto Sans CJK SC" style:font-size-asian="14.1000003814697pt" style:font-weight-asian="bold" style:font-name-complex="Lohit Devanagari1" style:font-size-complex="14.1000003814697pt" style:font-weight-complex="bold"/>
    </style:style>
    <style:style style:name="T32" style:family="text">
      <style:text-properties officeooo:rsid="003bbc21"/>
    </style:style>
    <style:style style:name="T33" style:family="text">
      <style:text-properties fo:font-weight="bold"/>
    </style:style>
    <style:style style:name="T34" style:family="text">
      <style:text-properties fo:font-style="italic"/>
    </style:style>
    <style:style style:name="T35" style:family="text">
      <style:text-properties officeooo:rsid="00244c4d"/>
    </style:style>
    <style:style style:name="T36" style:family="text">
      <style:text-properties officeooo:rsid="00248b94"/>
    </style:style>
    <style:style style:name="T37" style:family="text">
      <style:text-properties officeooo:rsid="0036c59c"/>
    </style:style>
    <style:style style:name="T38" style:family="text">
      <style:text-properties officeooo:rsid="0026f1c8"/>
    </style:style>
    <style:style style:name="T39" style:family="text">
      <style:text-properties officeooo:rsid="0035a38b"/>
    </style:style>
    <style:style style:name="T40" style:family="text">
      <style:text-properties officeooo:rsid="0024d8fd"/>
    </style:style>
    <style:style style:name="T41" style:family="text">
      <style:text-properties fo:color="#000000" loext:opacity="100%" style:font-name="Noto Mono" fo:background-color="transparent" loext:char-shading-value="0"/>
    </style:style>
    <style:style style:name="T42" style:family="text">
      <style:text-properties fo:color="#2a00ff" loext:opacity="100%" style:font-name="Noto Mono"/>
    </style:style>
    <style:style style:name="T43" style:family="text">
      <style:text-properties fo:color="#000000" loext:opacity="100%" style:font-name="Noto Mono" fo:font-style="italic" style:font-style-asian="italic"/>
    </style:style>
    <style:style style:name="T44" style:family="text">
      <style:text-properties fo:color="#000000" loext:opacity="100%" style:font-name="Noto Mono" fo:font-size="10pt" style:font-size-asian="10pt" style:font-size-complex="10pt"/>
    </style:style>
    <style:style style:name="T45" style:family="text">
      <style:text-properties fo:color="#2a00ff" loext:opacity="100%" style:font-name="Noto Mono" fo:font-size="10pt" officeooo:rsid="0028f06f" fo:background-color="#ffff00" loext:char-shading-value="0" style:font-size-asian="10pt" style:font-size-complex="10pt"/>
    </style:style>
    <style:style style:name="T46" style:family="text">
      <style:text-properties officeooo:rsid="0029aa6c"/>
    </style:style>
    <style:style style:name="T47" style:family="text">
      <style:text-properties officeooo:rsid="00214ba7"/>
    </style:style>
    <style:style style:name="T48" style:family="text">
      <style:text-properties officeooo:rsid="00211943"/>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mplementation</text:h>
      <text:p text:style-name="P1">Since the Keith framework encloses code in exception-handling logic and enables Java util logging, programmers have the freedom to build without writing boilerplate structures. But how difficult is it to incorporate the Keith framework?</text:p>
      <text:p text:style-name="P1"/>
      <table:table table:name="Table1" table:style-name="Table1">
        <table:table-column table:style-name="Table1.A"/>
        <table:table-column table:style-name="Table1.B"/>
        <table:table-row table:style-name="Table1.1">
          <table:table-cell table:style-name="Table1.A1" office:value-type="string">
            <text:p text:style-name="Text_20_body">First, create a new Java project and add the</text:p>
            <text:p text:style-name="Text_20_body"><text:span text:style-name="T1">keith-[version].jar, </text:span><text:span text:style-name="T2">where [version] is replaced with the jar version such as 1.0.0.</text:span></text:p>
          </table:table-cell>
          <table:table-cell table:style-name="Table1.A1" office:value-type="string">
            <text:p text:style-name="Table_20_Contents"><text:s text:c="3"/><draw:frame draw:style-name="fr1" draw:name="Image1" text:anchor-type="as-char" svg:y="-1.0228in" svg:width="2.5in" svg:height="1.95in" draw:z-index="1"><draw:image xlink:href="Pictures/10000001000000E7000000A8E84A4D84.png" xlink:type="simple" xlink:show="embed" xlink:actuate="onLoad" draw:mime-type="image/png"/></draw:frame><text:s text:c="10"/></text:p>
            <text:p text:style-name="Table_20_Contents"/>
            <text:p text:style-name="Table_20_Contents"/>
            <text:p text:style-name="Table_20_Contents"/>
          </table:table-cell>
        </table:table-row>
        <table:table-row>
          <table:table-cell table:style-name="Table1.A1" office:value-type="string">
            <text:p text:style-name="Table_20_Contents"><draw:frame draw:style-name="fr2" draw:name="Image2" text:anchor-type="as-char" svg:width="4.05in" svg:height="4.4in" draw:z-index="0"><draw:image xlink:href="Pictures/10000001000002230000027828B69CB9.png" xlink:type="simple" xlink:show="embed" xlink:actuate="onLoad" draw:mime-type="image/png"/></draw:frame></text:p>
          </table:table-cell>
          <table:table-cell table:style-name="Table1.A1" office:value-type="string">
            <text:p text:style-name="Text_20_body"><text:span text:style-name="T3">Second</text:span><text:span text:style-name="T4">, create a new class extending com.</text:span><text:span text:style-name="T5">all9ssolutions.keith</text:span><text:span text:style-name="T4">.core.AbstractApplication, and check the options to create method stubs for the main method, constructors from superclass, and inherited abstract methods. By selecting these options the IDE will generate code required by the Keith framework.</text:span></text:p>
          </table:table-cell>
        </table:table-row>
      </table:table>
      <text:p text:style-name="Text_20_body"/>
      <text:p text:style-name="Text_20_body"><text:soft-page-break/><text:span text:style-name="T6">Us</text:span><text:span text:style-name="T7">ing the names provided, y</text:span><text:span text:style-name="T3">our generated code should look something like the following:</text:span></text:p>
      <text:p text:style-name="P2"/>
      <text:p text:style-name="P3"><text:span text:style-name="T8">package</text:span><text:span text:style-name="T9"> com.</text:span><text:span text:style-name="T10">my</text:span><text:span text:style-name="T9">automatedprocess.main;</text:span></text:p>
      <text:p text:style-name="P4"/>
      <text:p text:style-name="P5"><text:span text:style-name="T8">import</text:span><text:span text:style-name="T9"> java.util.Map;</text:span></text:p>
      <text:p text:style-name="P5"><text:span text:style-name="T8">import</text:span><text:span text:style-name="T9"> com.</text:span><text:span text:style-name="T11">all9ssolutions</text:span><text:span text:style-name="T9">.keith.core.AbstractApplication;</text:span></text:p>
      <text:p text:style-name="P4"/>
      <text:p text:style-name="P5"><text:span text:style-name="T8">public</text:span><text:span text:style-name="T9"> </text:span><text:span text:style-name="T8">class</text:span><text:span text:style-name="T9"> MyAutomatedProcess </text:span><text:span text:style-name="T8">extends</text:span><text:span text:style-name="T9"> AbstractApplication {</text:span></text:p>
      <text:p text:style-name="P5"><text:span text:style-name="T9"><text:tab/></text:span><text:span text:style-name="T8">private</text:span><text:span text:style-name="T9"> </text:span><text:span text:style-name="T8">static</text:span><text:span text:style-name="T9"> </text:span><text:span text:style-name="T8">final</text:span><text:span text:style-name="T9"> </text:span><text:span text:style-name="T8">long</text:span><text:span text:style-name="T9"> </text:span><text:span text:style-name="T12">serialVersionUID</text:span><text:span text:style-name="T9"> = 1L;</text:span></text:p>
      <text:p text:style-name="P4"/>
      <text:p text:style-name="P5"><text:span text:style-name="T9"><text:tab/></text:span><text:span text:style-name="T8">public</text:span><text:span text:style-name="T9"> MyAutomatedProcess(String[] </text:span><text:span text:style-name="T13">args</text:span><text:span text:style-name="T9">) {</text:span></text:p>
      <text:p text:style-name="P5"><text:span text:style-name="T9"><text:tab/><text:tab/></text:span><text:span text:style-name="T8">super</text:span><text:span text:style-name="T9">(</text:span><text:span text:style-name="T13">args</text:span><text:span text:style-name="T9">);</text:span></text:p>
      <text:p text:style-name="P6"><text:tab/>}</text:p>
      <text:p text:style-name="P6"><text:tab/></text:p>
      <text:p text:style-name="P5"><text:span text:style-name="T9"><text:tab/></text:span><text:span text:style-name="T8">public</text:span><text:span text:style-name="T9"> </text:span><text:span text:style-name="T8">static</text:span><text:span text:style-name="T9"> </text:span><text:span text:style-name="T8">void</text:span><text:span text:style-name="T9"> main(String[] </text:span><text:span text:style-name="T13">args</text:span><text:span text:style-name="T9">) {</text:span></text:p>
      <text:p text:style-name="P5"><text:span text:style-name="T9"><text:tab/><text:tab/></text:span><text:span text:style-name="T14">// </text:span><text:span text:style-name="T15">TODO</text:span><text:span text:style-name="T14"> Auto-generated method stub</text:span></text:p>
      <text:p text:style-name="P6"><text:tab/>}</text:p>
      <text:p text:style-name="P4"/>
      <text:p text:style-name="P5"><text:span text:style-name="T9"><text:tab/></text:span><text:span text:style-name="T16">@Override</text:span></text:p>
      <text:p text:style-name="P5"><text:span text:style-name="T9"><text:tab/></text:span><text:span text:style-name="T8">protected</text:span><text:span text:style-name="T9"> </text:span><text:span text:style-name="T8">void</text:span><text:span text:style-name="T9"> run() </text:span><text:span text:style-name="T8">throws</text:span><text:span text:style-name="T9"> Exception {</text:span></text:p>
      <text:p text:style-name="P5"><text:span text:style-name="T9"><text:tab/><text:tab/></text:span><text:span text:style-name="T14">// </text:span><text:span text:style-name="T15">TODO</text:span><text:span text:style-name="T14"> Auto-generated method stub</text:span></text:p>
      <text:p text:style-name="P6"><text:tab/>}</text:p>
      <text:p text:style-name="P4"/>
      <text:p text:style-name="P5"><text:span text:style-name="T9"><text:tab/></text:span><text:span text:style-name="T16">@Override</text:span></text:p>
      <text:p text:style-name="P5"><text:span text:style-name="T9"><text:tab/></text:span><text:span text:style-name="T8">protected</text:span><text:span text:style-name="T9"> Map&lt;String, String&gt; getProperties() {</text:span></text:p>
      <text:p text:style-name="P5"><text:span text:style-name="T9"><text:tab/><text:tab/></text:span><text:span text:style-name="T14">// </text:span><text:span text:style-name="T15">TODO</text:span><text:span text:style-name="T14"> Auto-generated method stub</text:span></text:p>
      <text:p text:style-name="P5"><text:span text:style-name="T9"><text:tab/><text:tab/></text:span><text:span text:style-name="T8">return</text:span><text:span text:style-name="T9"> </text:span><text:span text:style-name="T8">null</text:span><text:span text:style-name="T9">;</text:span></text:p>
      <text:p text:style-name="P6"><text:tab/>}</text:p>
      <text:p text:style-name="P6">}</text:p>
      <text:p text:style-name="P3"/>
      <text:p text:style-name="Text_20_body"><text:span text:style-name="T3">Third, connect the logic flow to the superclass by adding a statement to the main</text:span><text:span text:style-name="T17">()</text:span><text:span text:style-name="T3"> method instantiating your class, </text:span><text:span text:style-name="T17">and</text:span><text:span text:style-name="T3"> </text:span><text:span text:style-name="T17">add any properties to use in your logic flow with the getProperties() method:</text:span></text:p>
      <text:p text:style-name="P7"/>
      <text:p text:style-name="P8"><text:span text:style-name="T8">public</text:span><text:span text:style-name="T9"> </text:span><text:span text:style-name="T8">static</text:span><text:span text:style-name="T9"> </text:span><text:span text:style-name="T8">void</text:span><text:span text:style-name="T9"> main(String[] </text:span><text:span text:style-name="T13">args</text:span><text:span text:style-name="T9">) {</text:span></text:p>
      <text:p text:style-name="P5"><text:span text:style-name="T9"><text:tab/></text:span><text:span text:style-name="T18">new</text:span><text:span text:style-name="T19"> MyAutomatedProcess(</text:span><text:span text:style-name="T20">args</text:span><text:span text:style-name="T19">);</text:span></text:p>
      <text:p text:style-name="P6">}</text:p>
      <text:p text:style-name="P4"/>
      <text:p text:style-name="P9">@Override</text:p>
      <text:p text:style-name="P5"><text:span text:style-name="T8">protected</text:span><text:span text:style-name="T9"> Map&lt;String, String&gt; getProperties() {</text:span></text:p>
      <text:p text:style-name="P5"><text:span text:style-name="T9"><text:tab/></text:span><text:span text:style-name="T19">Map&lt;String, String&gt; </text:span><text:span text:style-name="T20">properties</text:span><text:span text:style-name="T19"> = </text:span><text:span text:style-name="T18">new</text:span><text:span text:style-name="T19"> HashMap&lt;&gt;();</text:span></text:p>
      <text:p text:style-name="P10"><text:span text:style-name="T21"><text:tab/></text:span><text:span text:style-name="T22">properties</text:span><text:span text:style-name="T23">.put(</text:span><text:span text:style-name="T24">"check.period"</text:span><text:span text:style-name="T23">, </text:span><text:span text:style-name="T24">"</text:span><text:span text:style-name="T25">3</text:span><text:span text:style-name="T24">000"</text:span><text:span text:style-name="T23">); </text:span><text:span text:style-name="T26">// </text:span><text:span text:style-name="T27">in milliseconds</text:span></text:p>
      <text:p text:style-name="P5"><text:span text:style-name="T9"><text:tab/></text:span><text:span text:style-name="T8">return</text:span><text:span text:style-name="T9"> </text:span><text:span text:style-name="T20">properties</text:span><text:span text:style-name="T9">;</text:span></text:p>
      <text:p text:style-name="P6">}</text:p>
      <text:p text:style-name="P8"/>
      <text:p text:style-name="Text_20_body"><text:soft-page-break/><text:span text:style-name="T17">Finally, use the run() method to provide logic for the automated process. In the following code, we demonstrate printing the property </text:span><text:span text:style-name="T7">added via the getProperties() method</text:span><text:span text:style-name="T17">:</text:span></text:p>
      <text:p text:style-name="P11">@Override</text:p>
      <text:p text:style-name="P5"><text:span text:style-name="T8">protected</text:span><text:span text:style-name="T9"> </text:span><text:span text:style-name="T8">void</text:span><text:span text:style-name="T9"> run() </text:span><text:span text:style-name="T8">throws</text:span><text:span text:style-name="T9"> Exception {</text:span></text:p>
      <text:p text:style-name="P5"><text:span text:style-name="T9"><text:tab/></text:span><text:span text:style-name="T28">getApplicationProperties</text:span><text:span text:style-name="T19">().list(System.</text:span><text:span text:style-name="T29">out</text:span><text:span text:style-name="T19">);</text:span></text:p>
      <text:p text:style-name="P12">}</text:p>
      <text:h text:style-name="P13" text:outline-level="3"><text:span text:style-name="T30">Modif</text:span><text:span text:style-name="T31">i</text:span><text:span text:style-name="T30">able Properties</text:span></text:h>
      <text:p text:style-name="P14">The fundamental principal in the Keith framework is supporting configured properties and exposing them to <text:span text:style-name="T32">team</text:span> <text:span text:style-name="T32">membe</text:span>rs for manipulation at before or during runtime. When an application starts, the Keith framework verifies the external properties file exists and the configured keys are present. <text:span text:style-name="T33">The values are not overwritten insuring they retain any modifications.</text:span> The application.properties file is found alongside the compiled automated process. For example, if an application, named <text:span text:style-name="T34">MyAutomatedProcess.jar</text:span> process lives on the Desktop, then the external properties will exist in <text:span text:style-name="T34">/home/Desktop/MyAutomatedProcess/resources/</text:span>.</text:p>
      <text:p text:style-name="Heading">Example 1</text:p>
      <text:p text:style-name="P15"><text:span text:style-name="T35">The logging level for an application needs to be raised without restarting </text:span><text:span text:style-name="T36">the process</text:span>:</text:p>
      <text:list text:style-name="L1">
        <text:list-item>
          <text:p text:style-name="P16">Open the external logging.properties file.</text:p>
        </text:list-item>
        <text:list-item>
          <text:p text:style-name="P17">Locate the package logging level <text:span text:style-name="T30">or add a class level logger key and value.</text:span></text:p>
        </text:list-item>
        <text:list-item>
          <text:p text:style-name="P17"><text:span text:style-name="T30">Set the appropriate logging level</text:span>.</text:p>
        </text:list-item>
        <text:list-item>
          <text:p text:style-name="P18"><text:span text:style-name="T6">S</text:span>ave the file.</text:p>
        </text:list-item>
      </text:list>
      <text:p text:style-name="P19"><text:s text:c="12"/><draw:frame draw:style-name="fr3" draw:name="Image3" text:anchor-type="as-char" svg:width="5.7701in" svg:height="2.25in" draw:z-index="2"><draw:image xlink:href="Pictures/10000001000003840000017F8B67BA0E.png" xlink:type="simple" xlink:show="embed" xlink:actuate="onLoad" draw:mime-type="image/png"/></draw:frame></text:p>
      <text:p text:style-name="P19"/>
      <text:p text:style-name="P19"><text:soft-page-break/><text:s text:c="12"/><draw:frame draw:style-name="fr4" draw:name="Image5" text:anchor-type="as-char" svg:y="-2.25in" svg:width="5.7701in" svg:height="2.25in" draw:z-index="3"><draw:image xlink:href="Pictures/1000000100000386000001812D1F8072.png" xlink:type="simple" xlink:show="embed" xlink:actuate="onLoad" draw:mime-type="image/png"/></draw:frame></text:p>
      <text:p text:style-name="P20"><text:span text:style-name="T37">E</text:span>xample 2</text:p>
      <text:p text:style-name="P21"><text:span text:style-name="T6">A </text:span><text:span text:style-name="T32">team member</text:span><text:span text:style-name="T35"> </text:span><text:span text:style-name="T6">needs </text:span><text:span text:style-name="T35">to manually shutdown an automated process.</text:span></text:p>
      <text:list text:style-name="L2">
        <text:list-item>
          <text:p text:style-name="P22"><text:span text:style-name="T30">During development a</text:span>dd a property named run and set its initial value to true.</text:p>
        </text:list-item>
        <text:list-item>
          <text:p text:style-name="P23"><text:span text:style-name="T38">At convenient stop points in the code, test the value of the run property. If </text:span><text:span text:style-name="T30">fals</text:span><text:span text:style-name="T38">e, </text:span><text:span text:style-name="T30">then </text:span><text:span text:style-name="T39">fork the logic to allow </text:span><text:span text:style-name="T38">shutdown.</text:span></text:p>
        </text:list-item>
        <text:list-item>
          <text:p text:style-name="P24">Test the operation:</text:p>
          <text:list>
            <text:list-item>
              <text:p text:style-name="P24">Run the code.</text:p>
            </text:list-item>
            <text:list-item>
              <text:p text:style-name="P25">Open the external <text:span text:style-name="T38">application</text:span>.properties file.</text:p>
            </text:list-item>
            <text:list-item>
              <text:p text:style-name="P25">Locate the <text:span text:style-name="T38">run property</text:span> <text:span text:style-name="T40">and change it.</text:span></text:p>
            </text:list-item>
            <text:list-item>
              <text:p text:style-name="P24">Save the file.</text:p>
            </text:list-item>
          </text:list>
        </text:list-item>
      </text:list>
      <text:p text:style-name="P26"/>
      <text:p text:style-name="P9">@Override</text:p>
      <text:p text:style-name="P5"><text:span text:style-name="T8">protected</text:span><text:span text:style-name="T9"> </text:span><text:span text:style-name="T8">void</text:span><text:span text:style-name="T9"> run() </text:span><text:span text:style-name="T8">throws</text:span><text:span text:style-name="T9"> Exception {</text:span></text:p>
      <text:p text:style-name="P5"><text:span text:style-name="T9"><text:tab/></text:span><text:span text:style-name="T18">boolean</text:span><text:span text:style-name="T19"> </text:span><text:span text:style-name="T20">run</text:span><text:span text:style-name="T19"> = </text:span><text:span text:style-name="T18">true</text:span><text:span text:style-name="T19">;</text:span></text:p>
      <text:p text:style-name="P27"><text:span text:style-name="T41"><text:tab/></text:span><text:span text:style-name="T8">while</text:span><text:span text:style-name="T9"> (</text:span><text:span text:style-name="T13">run</text:span><text:span text:style-name="T9">) {</text:span></text:p>
      <text:p text:style-name="P27"><text:span text:style-name="T41"><text:tab/><text:tab/></text:span><text:span text:style-name="T8">try</text:span><text:span text:style-name="T9"> {</text:span></text:p>
      <text:p text:style-name="P27"><text:span text:style-name="T41"><text:tab/><text:tab/><text:tab/></text:span><text:span text:style-name="T9">TimeUnit.</text:span><text:span text:style-name="T12">SECONDS</text:span><text:span text:style-name="T9">.sleep(5L);</text:span></text:p>
      <text:p text:style-name="P27"><text:span text:style-name="T41"><text:tab/><text:tab/></text:span><text:span text:style-name="T9">} </text:span><text:span text:style-name="T8">catch</text:span><text:span text:style-name="T9"> (InterruptedException </text:span><text:span text:style-name="T13">e</text:span><text:span text:style-name="T9">) {</text:span></text:p>
      <text:p text:style-name="P27"><text:span text:style-name="T41"><text:tab/><text:tab/><text:tab/></text:span><text:span text:style-name="T13">e</text:span><text:span text:style-name="T9">.printStackTrace(System.</text:span><text:span text:style-name="T12">err</text:span><text:span text:style-name="T9">);</text:span></text:p>
      <text:p text:style-name="P27"><text:span text:style-name="T41"><text:tab/><text:tab/></text:span><text:span text:style-name="T9">}</text:span></text:p>
      <text:p text:style-name="P27"><text:span text:style-name="T41"><text:tab/><text:tab/></text:span><text:span text:style-name="T9">System.</text:span><text:span text:style-name="T12">out</text:span><text:span text:style-name="T9">.println(</text:span><text:span text:style-name="T42">"Run is: "</text:span><text:span text:style-name="T9"> + </text:span><text:span text:style-name="T13">run</text:span><text:span text:style-name="T9">);</text:span></text:p>
      <text:p text:style-name="P28"><text:span text:style-name="T41"><text:tab/><text:tab/></text:span><text:span text:style-name="T13">run</text:span><text:span text:style-name="T9"> = Boolean.</text:span><text:span text:style-name="T43">parseBoolean</text:span><text:span text:style-name="T9">(</text:span><text:span text:style-name="T43">getApplicationProperties</text:span><text:span text:style-name="T9">()</text:span></text:p>
      <text:p text:style-name="P28"><text:span text:style-name="T41"><text:tab/><text:tab/><text:tab/></text:span><text:span text:style-name="T9">.getProperty(</text:span><text:span text:style-name="T42">"run"</text:span><text:span text:style-name="T9">, </text:span><text:span text:style-name="T42">"false"</text:span><text:span text:style-name="T9">));</text:span></text:p>
      <text:p text:style-name="P27"><text:span text:style-name="T41"><text:tab/></text:span><text:span text:style-name="T9">}</text:span></text:p>
      <text:p text:style-name="P27"><text:span text:style-name="T41"><text:tab/></text:span><text:span text:style-name="T9">System.</text:span><text:span text:style-name="T12">out</text:span><text:span text:style-name="T9">.println(</text:span><text:span text:style-name="T42">"Done!"</text:span><text:span text:style-name="T9">);</text:span></text:p>
      <text:p text:style-name="P6">}</text:p>
      <text:p text:style-name="P9"/>
      <text:p text:style-name="P9">@Override</text:p>
      <text:p text:style-name="P5"><text:span text:style-name="T8">protected</text:span><text:span text:style-name="T9"> Map&lt;String, String&gt; getProperties() {</text:span></text:p>
      <text:p text:style-name="P5"><text:soft-page-break/><text:span text:style-name="T9"><text:tab/>Map&lt;String, String&gt; </text:span><text:span text:style-name="T13">properties</text:span><text:span text:style-name="T9"> = </text:span><text:span text:style-name="T8">new</text:span><text:span text:style-name="T9"> HashMap&lt;&gt;();</text:span></text:p>
      <text:p text:style-name="P5"><text:span text:style-name="T9"><text:tab/></text:span><text:span text:style-name="T13">properties</text:span><text:span text:style-name="T9">.put(</text:span><text:span text:style-name="T42">"check.period"</text:span><text:span text:style-name="T9">, </text:span><text:span text:style-name="T42">"5000"</text:span><text:span text:style-name="T9">);</text:span></text:p>
      <text:p text:style-name="P29"><text:span text:style-name="T44"><text:tab/></text:span><text:span text:style-name="T22">properties</text:span><text:span text:style-name="T23">.put(</text:span><text:span text:style-name="T24">"run"</text:span><text:span text:style-name="T23">, </text:span><text:span text:style-name="T24">"</text:span><text:span text:style-name="T45">true</text:span><text:span text:style-name="T24">"</text:span><text:span text:style-name="T23">);</text:span></text:p>
      <text:p text:style-name="P5"><text:span text:style-name="T9"><text:tab/></text:span><text:span text:style-name="T8">return</text:span><text:span text:style-name="T9"> </text:span><text:span text:style-name="T13">properties</text:span><text:span text:style-name="T9">;</text:span></text:p>
      <text:p text:style-name="P6">}</text:p>
      <text:p text:style-name="Text_20_body"/>
      <text:p text:style-name="P30">Note:</text:p>
      <text:p text:style-name="P14">The <text:span text:style-name="T46">code </text:span><text:span text:style-name="T30">must query the property</text:span><text:span text:style-name="T46"> </text:span><text:span text:style-name="T30">at</text:span><text:span text:style-name="T46"> each iteration for a changed value. </text:span><text:span text:style-name="T30">It must access the AbstractApplication.getApplicationProperties() method for updates, NOT the getPropeties() method found in the implementing class.</text:span></text:p>
      <text:p text:style-name="P14"/>
      <text:h text:style-name="P31" text:outline-level="3"><text:span text:style-name="T37">A</text:span>dditional Methods</text:h>
      <text:p text:style-name="P1"><text:span text:style-name="T47">The run() method is required to be overridden and should contain the application logic. </text:span><text:span text:style-name="T7">But t</text:span><text:span text:style-name="T47">here are additional methods available which may be overridden and are called by </text:span><text:span text:style-name="T7">the Keith framework</text:span><text:span text:style-name="T47">:</text:span></text:p>
      <text:list text:style-name="L3">
        <text:list-item>
          <text:p text:style-name="P32"><text:span text:style-name="T7">Include a</text:span><text:span text:style-name="T48"> preprocess() </text:span><text:span text:style-name="T47">method to provide logic which should be executed before the Keith framework is fully initialized.</text:span></text:p>
        </text:list-item>
        <text:list-item>
          <text:p text:style-name="P32"><text:span text:style-name="T7">Include a</text:span><text:span text:style-name="T47"> </text:span><text:span text:style-name="T48">process() </text:span><text:span text:style-name="T47">method to provide logic which should be executed after the Keith framework is initialized, but before the run() method is called.</text:span></text:p>
        </text:list-item>
        <text:list-item>
          <text:p text:style-name="P32"><text:span text:style-name="T7">Include a</text:span><text:span text:style-name="T47"> postprocess() method to provide shut down, or clean up logic, </text:span><text:span text:style-name="T7">called after the run() method completes</text:span><text:span text:style-name="T47">.</text:span></text:p>
        </text:list-item>
      </text:list>
      <text:p text:style-name="P33"><text:span text:style-name="T39">The Keith framework also insures a logging.properties file exists. In the rare scenario logging levels may need to be raised or lowered, this file is available to receive modifications. </text:span><text:span text:style-name="T47">To change the log levels for one or more packages beyond a single cycle, modify the external properties file (see </text:span><text:span text:style-name="T37">Modifiable </text:span><text:span text:style-name="T47">Propert</text:span><text:span text:style-name="T37">ies</text:span><text:span text:style-name="T47"> for more).</text:span></text:p>
      <text:p text:style-name="P33"/>
      <text:p text:style-name="P33"><text:span text:style-name="T39">Similar behavior may be incorporated in the code.</text:span><text:span text:style-name="T47"> </text:span><text:span text:style-name="T39">U</text:span><text:span text:style-name="T48">se the setLoggingLevel() </text:span><text:span text:style-name="T47">method</text:span><text:span text:style-name="T48"> </text:span><text:span text:style-name="T47">in LoggingProperties to change the </text:span><text:span text:style-name="T7">levels</text:span><text:span text:style-name="T47"> for all application packages. Th</text:span><text:span text:style-name="T39">os</text:span><text:span text:style-name="T47">e levels will be changed for one check period, then return to values set in the logging.properties fi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011328e" officeooo:paragraph-rsid="0011328e" style:font-weight-asian="bold" style:font-weight-complex="bold"/>
    </style:style>
    <style:style style:name="MP2" style:family="paragraph" style:parent-style-name="Footer">
      <style:paragraph-properties fo:text-align="center" style:justify-single-word="false"/>
    </style:style>
    <style:style style:name="MT1" style:family="text">
      <style:text-properties officeooo:rsid="003914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eith Framework</text:p>
      </style:header>
      <style:footer>
        <text:p text:style-name="MP2"><text:page-number text:select-page="current">6</text:page-number><text:s/><text:span text:style-name="MT1">of </text:span><text:span text:style-name="MT1"><text:page-count>6</text:page-count></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7T23:37:32.862847224</meta:creation-date>
    <dc:date>2026-06-12T01:57:24.226705300</dc:date>
    <meta:editing-duration>PT3H52M19S</meta:editing-duration>
    <meta:editing-cycles>26</meta:editing-cycles>
    <meta:generator>LibreOffice/26.2.3.2$Windows_X86_64 LibreOffice_project/70e089b17412e4cb7773e41413306b17a2328c34</meta:generator>
    <meta:print-date>2026-06-12T01:58:42.332325400</meta:print-date>
    <meta:printed-by>PDF files</meta:printed-by>
    <meta:document-statistic meta:table-count="1" meta:image-count="4" meta:object-count="0" meta:page-count="6" meta:paragraph-count="97" meta:word-count="761" meta:character-count="5390" meta:non-whitespace-character-count="4644"/>
  </office:meta>
</office:document-meta>
</file>