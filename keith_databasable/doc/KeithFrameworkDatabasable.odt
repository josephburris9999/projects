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2A000000E86EC46E1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roman" style:font-pitch="variable"/>
    <style:font-face style:name="Noto Mono" svg:font-family="'Noto Mono'"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6.9375in" fo:margin-left="0in" table:align="left"/>
    </style:style>
    <style:style style:name="Table3.A" style:family="table-column">
      <style:table-column-properties style:column-width="3.4618in"/>
    </style:style>
    <style:style style:name="Table3.B" style:family="table-column">
      <style:table-column-properties style:column-width="3.4757in"/>
    </style:style>
    <style:style style:name="Table3.1" style:family="table-row">
      <style:table-row-properties style:min-row-height="1.75in"/>
    </style:style>
    <style:style style:name="Table3.A1" style:family="table-cell">
      <style:table-cell-properties fo:padding="0.0382in" fo:border="none"/>
    </style:style>
    <style:style style:name="P1" style:family="paragraph" style:parent-style-name="Text_20_body">
      <style:text-properties officeooo:paragraph-rsid="0041a891"/>
    </style:style>
    <style:style style:name="P2" style:family="paragraph" style:parent-style-name="Text_20_body">
      <style:text-properties fo:color="#000000" loext:opacity="100%" style:font-name="Monospace" fo:font-size="10pt" officeooo:rsid="00198867" officeooo:paragraph-rsid="0041a891" style:font-size-asian="10pt" style:font-size-complex="10pt"/>
    </style:style>
    <style:style style:name="P3" style:family="paragraph" style:parent-style-name="Heading_20_3">
      <style:text-properties officeooo:paragraph-rsid="00462219"/>
    </style:style>
    <style:style style:name="P4" style:family="paragraph" style:parent-style-name="Text_20_body">
      <style:text-properties officeooo:paragraph-rsid="0047a7a1"/>
    </style:style>
    <style:style style:name="P5" style:family="paragraph" style:parent-style-name="Text_20_body">
      <style:text-properties officeooo:paragraph-rsid="00375045"/>
    </style:style>
    <style:style style:name="P6" style:family="paragraph" style:parent-style-name="Text_20_body" style:list-style-name="L1">
      <style:text-properties officeooo:rsid="00375045" officeooo:paragraph-rsid="00375045"/>
    </style:style>
    <style:style style:name="P7" style:family="paragraph" style:parent-style-name="Standard">
      <style:text-properties officeooo:rsid="00375045" officeooo:paragraph-rsid="003912b3"/>
    </style:style>
    <style:style style:name="P8" style:family="paragraph" style:parent-style-name="Standard">
      <style:text-properties officeooo:paragraph-rsid="003912b3"/>
    </style:style>
    <style:style style:name="P9" style:family="paragraph" style:parent-style-name="Text_20_body" style:list-style-name="L1">
      <style:text-properties officeooo:rsid="0047a7a1" officeooo:paragraph-rsid="0047a7a1"/>
    </style:style>
    <style:style style:name="P10" style:family="paragraph" style:parent-style-name="Standard">
      <style:text-properties fo:font-size="10pt" officeooo:rsid="0047a7a1" officeooo:paragraph-rsid="0047a7a1" fo:background-color="transparent" style:font-size-asian="10pt" style:font-size-complex="10pt"/>
    </style:style>
    <style:style style:name="P11" style:family="paragraph" style:parent-style-name="Text_20_body" style:list-style-name="L1">
      <style:text-properties officeooo:rsid="003912b3" officeooo:paragraph-rsid="003912b3"/>
    </style:style>
    <style:style style:name="P12" style:family="paragraph" style:parent-style-name="Standard">
      <style:paragraph-properties fo:margin-left="0in" fo:margin-right="0in" fo:text-align="left" style:justify-single-word="false" fo:text-indent="0in" style:auto-text-indent="false"/>
      <style:text-properties fo:font-size="10pt" style:font-size-asian="10pt" style:font-size-complex="10pt"/>
    </style:style>
    <style:style style:name="P13" style:family="paragraph" style:parent-style-name="Standard">
      <style:text-properties fo:color="#000000" loext:opacity="100%" style:font-name="Noto Mono" fo:font-size="10pt" officeooo:rsid="003912b3" officeooo:paragraph-rsid="003912b3" style:font-size-asian="10pt" style:font-size-complex="10pt"/>
    </style:style>
    <style:style style:name="P14" style:family="paragraph" style:parent-style-name="Text_20_body" style:list-style-name="L2">
      <style:text-properties officeooo:paragraph-rsid="003912b3"/>
    </style:style>
    <style:style style:name="P15" style:family="paragraph" style:parent-style-name="Text_20_body" style:list-style-name="L2">
      <style:text-properties officeooo:rsid="003912b3" officeooo:paragraph-rsid="003912b3"/>
    </style:style>
    <style:style style:name="P16" style:family="paragraph" style:parent-style-name="Standard">
      <style:text-properties officeooo:paragraph-rsid="003c06d1"/>
    </style:style>
    <style:style style:name="P17" style:family="paragraph" style:parent-style-name="Standard">
      <style:paragraph-properties fo:margin-left="0in" fo:margin-right="0in" fo:text-align="left" style:justify-single-word="false" fo:text-indent="0in" style:auto-text-indent="false"/>
      <style:text-properties fo:color="#000000" loext:opacity="100%" style:font-name="Noto Mono" fo:font-size="10pt" style:font-size-asian="10pt" style:font-size-complex="10pt"/>
    </style:style>
    <style:style style:name="P18" style:family="paragraph" style:parent-style-name="Standard">
      <style:paragraph-properties fo:margin-left="0in" fo:margin-right="0in" fo:text-align="left" style:justify-single-word="false" fo:text-indent="0in" style:auto-text-indent="false"/>
      <style:text-properties style:font-name="Noto Mono" fo:font-size="10pt" style:font-size-asian="10pt" style:font-size-complex="10pt"/>
    </style:style>
    <style:style style:name="P19" style:family="paragraph" style:parent-style-name="Standard">
      <style:paragraph-properties fo:margin-left="0in" fo:margin-right="0in" fo:text-align="left" style:justify-single-word="false" fo:text-indent="0in" style:auto-text-indent="false"/>
      <style:text-properties fo:font-size="10pt" officeooo:paragraph-rsid="0047a7a1" style:font-size-asian="10pt" style:font-size-complex="10pt"/>
    </style:style>
    <style:style style:name="P20" style:family="paragraph" style:parent-style-name="Standard">
      <style:text-properties officeooo:rsid="0044a018" officeooo:paragraph-rsid="003c06d1"/>
    </style:style>
    <style:style style:name="P21" style:family="paragraph" style:parent-style-name="Heading_20_3">
      <style:text-properties officeooo:rsid="0029aa6c" officeooo:paragraph-rsid="0029aa6c"/>
    </style:style>
    <style:style style:name="P22" style:family="paragraph" style:parent-style-name="Text_20_body">
      <style:text-properties officeooo:paragraph-rsid="004273fd"/>
    </style:style>
    <style:style style:name="P23" style:family="paragraph" style:parent-style-name="Text_20_body">
      <style:text-properties officeooo:paragraph-rsid="003a4fce"/>
    </style:style>
    <style:style style:name="P24" style:family="paragraph" style:parent-style-name="Text_20_body">
      <style:text-properties officeooo:rsid="003db636" officeooo:paragraph-rsid="003db636"/>
    </style:style>
    <style:style style:name="P25" style:family="paragraph" style:parent-style-name="Text_20_body">
      <style:text-properties officeooo:paragraph-rsid="003db636"/>
    </style:style>
    <style:style style:name="T1" style:family="text">
      <style:text-properties officeooo:rsid="002ce32f"/>
    </style:style>
    <style:style style:name="T2" style:family="text">
      <style:text-properties officeooo:rsid="0041a891"/>
    </style:style>
    <style:style style:name="T3" style:family="text">
      <style:text-properties officeooo:rsid="00462219"/>
    </style:style>
    <style:style style:name="T4" style:family="text">
      <style:text-properties officeooo:rsid="002ec777"/>
    </style:style>
    <style:style style:name="T5" style:family="text">
      <style:text-properties officeooo:rsid="00375045"/>
    </style:style>
    <style:style style:name="T6" style:family="text">
      <style:text-properties officeooo:rsid="001556ab"/>
    </style:style>
    <style:style style:name="T7" style:family="text">
      <style:text-properties officeooo:rsid="0017e0a0"/>
    </style:style>
    <style:style style:name="T8" style:family="text">
      <style:text-properties officeooo:rsid="0047a7a1"/>
    </style:style>
    <style:style style:name="T9" style:family="text">
      <style:text-properties officeooo:rsid="003a4fce"/>
    </style:style>
    <style:style style:name="T10" style:family="text">
      <style:text-properties fo:color="#7f0055" loext:opacity="100%" style:font-name="Monospace" fo:font-size="10pt" fo:font-weight="bold" officeooo:rsid="003912b3" fo:background-color="transparent" loext:char-shading-value="0" style:font-size-asian="10pt" style:font-weight-asian="bold"/>
    </style:style>
    <style:style style:name="T11" style:family="text">
      <style:text-properties fo:color="#7f0055" loext:opacity="100%" style:font-name="Monospace" fo:font-size="10pt" fo:font-weight="bold" fo:background-color="transparent" loext:char-shading-value="0" style:font-size-asian="10pt" style:font-weight-asian="bold"/>
    </style:style>
    <style:style style:name="T12" style:family="text">
      <style:text-properties fo:color="#000000" loext:opacity="100%" style:font-name="Monospace" fo:font-size="10pt" style:font-size-asian="10pt"/>
    </style:style>
    <style:style style:name="T13" style:family="text">
      <style:text-properties fo:color="#7f0055" loext:opacity="100%" style:font-name="Monospace" fo:font-size="10pt" fo:font-weight="bold" style:font-size-asian="10pt" style:font-weight-asian="bold"/>
    </style:style>
    <style:style style:name="T14" style:family="text">
      <style:text-properties fo:color="#000000" loext:opacity="100%" style:font-name="Monospace" fo:font-size="10pt" fo:font-weight="bold" officeooo:rsid="00375045" style:font-size-asian="10pt" style:font-weight-asian="bold"/>
    </style:style>
    <style:style style:name="T15" style:family="text">
      <style:text-properties fo:color="#7f0055" loext:opacity="100%" style:font-name="Monospace" fo:font-size="10pt" fo:font-weight="bold" officeooo:rsid="00375045" style:font-size-asian="10pt" style:font-weight-asian="bold"/>
    </style:style>
    <style:style style:name="T16" style:family="text">
      <style:text-properties fo:color="#000000" loext:opacity="100%" style:font-name="Monospace" fo:font-size="10pt" officeooo:rsid="00375045" style:font-size-asian="10pt"/>
    </style:style>
    <style:style style:name="T17" style:family="text">
      <style:text-properties fo:color="#000000" loext:opacity="100%" style:font-name="Monospace" fo:font-size="10pt" officeooo:rsid="0047a7a1" style:font-size-asian="10pt"/>
    </style:style>
    <style:style style:name="T18" style:family="text">
      <style:text-properties fo:color="#7f0055" loext:opacity="100%" style:font-name="Noto Mono" fo:font-weight="bold" style:font-weight-asian="bold"/>
    </style:style>
    <style:style style:name="T19" style:family="text">
      <style:text-properties fo:color="#000000" loext:opacity="100%" style:font-name="Noto Mono"/>
    </style:style>
    <style:style style:name="T20" style:family="text">
      <style:text-properties fo:color="#0000c0" loext:opacity="100%" style:font-name="Noto Mono" fo:font-style="italic" fo:font-weight="bold" style:font-style-asian="italic" style:font-weight-asian="bold"/>
    </style:style>
    <style:style style:name="T21" style:family="text">
      <style:text-properties fo:color="#000000" loext:opacity="100%" style:font-name="Noto Mono" fo:font-style="italic" style:font-style-asian="italic"/>
    </style:style>
    <style:style style:name="T22" style:family="text">
      <style:text-properties fo:color="#2a00ff" loext:opacity="100%" style:font-name="Noto Mono"/>
    </style:style>
    <style:style style:name="T23" style:family="text">
      <style:text-properties fo:color="#646464" loext:opacity="100%" style:font-name="Monospace" fo:font-size="10pt" officeooo:rsid="003912b3" style:font-size-asian="10pt"/>
    </style:style>
    <style:style style:name="T24" style:family="text">
      <style:text-properties fo:color="#646464" loext:opacity="100%" style:font-name="Noto Mono" fo:font-size="10pt" style:font-size-asian="10pt" style:font-size-complex="10pt"/>
    </style:style>
    <style:style style:name="T25" style:family="text">
      <style:text-properties fo:color="#6a3e3e" loext:opacity="100%" style:font-name="Noto Mono"/>
    </style:style>
    <style:style style:name="T26" style:family="text">
      <style:text-properties fo:color="#2a00ff" loext:opacity="100%" style:font-name="Noto Mono" officeooo:rsid="004db9a9"/>
    </style:style>
    <style:style style:name="T27" style:family="text">
      <style:text-properties officeooo:rsid="003912b3"/>
    </style:style>
    <style:style style:name="T28" style:family="text">
      <style:text-properties officeooo:rsid="004c8773"/>
    </style:style>
    <style:style style:name="T29" style:family="text">
      <style:text-properties fo:color="#646464" loext:opacity="100%" style:font-name="Monospace" fo:font-size="10pt" style:font-size-asian="10pt"/>
    </style:style>
    <style:style style:name="T30" style:family="text">
      <style:text-properties fo:color="#646464" loext:opacity="100%" style:font-name="Noto Mono"/>
    </style:style>
    <style:style style:name="T31" style:family="text">
      <style:text-properties officeooo:rsid="0033bb88"/>
    </style:style>
    <style:style style:name="T32" style:family="text">
      <style:text-properties officeooo:rsid="004273fd"/>
    </style:style>
    <style:style style:name="T33" style:family="text">
      <style:text-properties officeooo:rsid="0048dacb"/>
    </style:style>
    <style:style style:name="T34" style:family="text">
      <style:text-properties officeooo:rsid="003c9c86"/>
    </style:style>
    <style:style style:name="T35" style:family="text">
      <style:text-properties officeooo:rsid="003c06d1"/>
    </style:style>
    <style:style style:name="T36" style:family="text">
      <style:text-properties style:text-position="super 58%" officeooo:rsid="0048dacb"/>
    </style:style>
    <style:style style:name="T37" style:family="text">
      <style:text-properties officeooo:rsid="003db63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Introduction</text:h>
      <text:p text:style-name="P1"><text:span text:style-name="T1">Th</text:span><text:span text:style-name="T2">e </text:span><text:span text:style-name="T3">Databas</text:span><text:span text:style-name="T2">able enhancement for the Keith framework </text:span><text:span text:style-name="T1">is </text:span><text:span text:style-name="T2">a way to </text:span><text:span text:style-name="T3">provide the common logic for accessing a database using the JDBC/DAO pattern</text:span><text:span text:style-name="T2">. </text:span><text:span text:style-name="T3">Only the basics for getting a database connection, closing resources, and logging warnings are provided. This allows implementing programmers the freedom to incorporate their own logic throughout the persistence process.</text:span></text:p>
      <text:p text:style-name="P1"/>
      <text:p text:style-name="P1"><text:span text:style-name="T1">If you are not familiar with the Keith framework, </text:span><text:span text:style-name="T4">then </text:span><text:span text:style-name="T1">please review the documentation before continuing. </text:span><text:span text:style-name="T3">If you are interested in writing an enhancement yourself, then please review the Keith Steppable documentation, as well as the source for the Steppable and Databasable enhancements.</text:span><text:span text:style-name="T1"> </text:span><text:span text:style-name="T2">This document addresses </text:span><text:span text:style-name="T3">implement</text:span><text:span text:style-name="T2">ing the I</text:span><text:span text:style-name="T3">Databas</text:span><text:span text:style-name="T2">able interface in an automated process.</text:span></text:p>
      <text:p text:style-name="P2"/>
      <text:h text:style-name="P3" text:outline-level="3">Implementation</text:h>
      <table:table table:name="Table3" table:style-name="Table3">
        <table:table-column table:style-name="Table3.A"/>
        <table:table-column table:style-name="Table3.B"/>
        <table:table-row table:style-name="Table3.1">
          <table:table-cell table:style-name="Table3.A1" office:value-type="string">
            <text:p text:style-name="P4"><text:span text:style-name="T5">First, create a new Java project and add the </text:span><text:span text:style-name="T6">keith-[version].jar.</text:span><text:span text:style-name="T7"> </text:span><text:span text:style-name="T8">Then, add the keith-databasable-[version].jar. Finally, add the database connector jar(s) and any dependencies. Insure all are on the automated process classpath.</text:span></text:p>
            <text:p text:style-name="P4"><text:span text:style-name="T8">The </text:span><text:span text:style-name="T7">[version] </text:span><text:span text:style-name="T8">place holder</text:span><text:span text:style-name="T7"> </text:span><text:span text:style-name="T8">should be</text:span><text:span text:style-name="T7"> replaced with the jar version such as 1.0.0.</text:span></text:p>
          </table:table-cell>
          <table:table-cell table:style-name="Table3.A1" office:value-type="string">
            <text:p text:style-name="Table_20_Contents"><draw:frame draw:style-name="fr1" draw:name="Image1" text:anchor-type="char" svg:width="2.1902in" svg:height="1.7571in" draw:z-index="0"><draw:image xlink:href="Pictures/100000010000012A000000E86EC46E1E.png" xlink:type="simple" xlink:show="embed" xlink:actuate="onLoad" draw:mime-type="image/png"/></draw:frame></text:p>
          </table:table-cell>
        </table:table-row>
      </table:table>
      <text:p text:style-name="P5"><text:span text:style-name="T9">U</text:span><text:span text:style-name="T5">pdate the code to use the enhancement:</text:span></text:p>
      <text:list text:style-name="L1">
        <text:list-item>
          <text:p text:style-name="P6">Implement the interface in your class:</text:p>
        </text:list-item>
      </text:list>
      <text:p text:style-name="P7"><text:span text:style-name="T10"><text:tab/>pu</text:span><text:span text:style-name="T11">blic</text:span><text:span text:style-name="T12"> </text:span><text:span text:style-name="T13">class</text:span><text:span text:style-name="T12"> MyAutomatedProcess </text:span><text:span text:style-name="T13">extends</text:span><text:span text:style-name="T12"> AbstractApplication</text:span></text:p>
      <text:p text:style-name="P8"><text:span text:style-name="T14"><text:tab/><text:tab/></text:span><text:span text:style-name="T15">implements</text:span><text:span text:style-name="T16"> I</text:span><text:span text:style-name="T17">Databas</text:span><text:span text:style-name="T16">able {</text:span></text:p>
      <text:list text:continue-numbering="true" text:style-name="L1">
        <text:list-item>
          <text:p text:style-name="P9">This enhancement uses Java util logging so include a class variable:</text:p>
        </text:list-item>
      </text:list>
      <text:p text:style-name="P10"><text:span text:style-name="T18"><text:tab/>private</text:span><text:span text:style-name="T19"> </text:span><text:span text:style-name="T18">static</text:span><text:span text:style-name="T19"> </text:span><text:span text:style-name="T18">final</text:span><text:span text:style-name="T19"> Logger </text:span><text:span text:style-name="T20">logger</text:span><text:span text:style-name="T19"> =</text:span></text:p>
      <text:p text:style-name="P10"><text:span text:style-name="T19"><text:tab/><text:tab/>Logger.</text:span><text:span text:style-name="T21">getLogger</text:span><text:span text:style-name="T19">(</text:span><text:span text:style-name="T22">"com.myautomatedprocess.MyAutomatedProcess"</text:span><text:span text:style-name="T19">);</text:span></text:p>
      <text:list text:continue-numbering="true" text:style-name="L1">
        <text:list-item>
          <text:p text:style-name="P11">Add the <text:span text:style-name="T8">contractual method from the </text:span>interface:</text:p>
        </text:list-item>
      </text:list>
      <text:p text:style-name="P8"><text:span text:style-name="T23"><text:tab/></text:span><text:span text:style-name="T24">@Override</text:span></text:p>
      <text:p text:style-name="P12"><text:span text:style-name="T19"><text:tab/></text:span><text:span text:style-name="T18">public</text:span><text:span text:style-name="T19"> DatabaseProperties[] getDatabaseProperties() {</text:span></text:p>
      <text:p text:style-name="P12"><text:span text:style-name="T19"><text:tab/><text:tab/>DatabaseProperties[] </text:span><text:span text:style-name="T25">models</text:span><text:span text:style-name="T19"> = </text:span><text:span text:style-name="T18">new</text:span><text:span text:style-name="T19"> DatabaseProperties[1];</text:span></text:p>
      <text:p text:style-name="P12"><text:span text:style-name="T19"><text:tab/><text:tab/></text:span><text:span text:style-name="T25">models</text:span><text:span text:style-name="T19">[0] = </text:span><text:span text:style-name="T18">new</text:span><text:span text:style-name="T19"> DatabaseProperties(</text:span><text:span text:style-name="T22">"mysql"</text:span><text:span text:style-name="T19">);</text:span></text:p>
      <text:p text:style-name="P12"><text:span text:style-name="T19"><text:tab/><text:tab/></text:span><text:span text:style-name="T25">models</text:span><text:span text:style-name="T19">[0].setDriver(</text:span><text:span text:style-name="T22">"com.mysql.jdbc.Driver"</text:span><text:span text:style-name="T19">);</text:span></text:p>
      <text:p text:style-name="P12"><text:span text:style-name="T19"><text:tab/><text:tab/></text:span><text:span text:style-name="T25">models</text:span><text:span text:style-name="T19">[0].setUrl(</text:span><text:span text:style-name="T22">"jdbc:mysql://localhost:3306/mysql?</text:span><text:span text:style-name="T26">useUnicode=true&amp;characterEncoding=UTF-8</text:span><text:span text:style-name="T22">"</text:span><text:span text:style-name="T19">);</text:span></text:p>
      <text:p text:style-name="P12"><text:span text:style-name="T19"><text:tab/><text:tab/></text:span><text:span text:style-name="T25">models</text:span><text:span text:style-name="T19">[0].setPassword(</text:span><text:span text:style-name="T22">""</text:span><text:span text:style-name="T19">);</text:span></text:p>
      <text:p text:style-name="P12"><text:span text:style-name="T19"><text:tab/><text:tab/></text:span><text:span text:style-name="T25">models</text:span><text:span text:style-name="T19">[0].setUsername(</text:span><text:span text:style-name="T22">""</text:span><text:span text:style-name="T19">);</text:span></text:p>
      <text:p text:style-name="P12"><text:span text:style-name="T19"><text:tab/><text:tab/></text:span><text:span text:style-name="T18">return</text:span><text:span text:style-name="T19"> </text:span><text:span text:style-name="T25">models</text:span><text:span text:style-name="T19">;</text:span></text:p>
      <text:p text:style-name="P13"><text:soft-page-break/><text:tab/>}</text:p>
      <text:list text:style-name="L2">
        <text:list-item>
          <text:list>
            <text:list-item>
              <text:p text:style-name="P14"><text:span text:style-name="T27">Note the getDatabaseProperties() method supports multiple database definitions allowing an automated process to work with more than </text:span><text:span text:style-name="T28">one</text:span><text:span text:style-name="T27"> database. This logic is dependent on unique IDs for each model.</text:span></text:p>
            </text:list-item>
          </text:list>
        </text:list-item>
        <text:list-item>
          <text:p text:style-name="P15">Add code using the enhancement:</text:p>
        </text:list-item>
      </text:list>
      <text:p text:style-name="P16"><text:span text:style-name="T29"><text:tab/></text:span><text:span text:style-name="T24">@Override</text:span></text:p>
      <text:p text:style-name="P12"><text:span text:style-name="T19"><text:tab/></text:span><text:span text:style-name="T18">protected</text:span><text:span text:style-name="T19"> </text:span><text:span text:style-name="T18">void</text:span><text:span text:style-name="T19"> process() </text:span><text:span text:style-name="T18">throws</text:span><text:span text:style-name="T19"> Exception {</text:span></text:p>
      <text:p text:style-name="P12"><text:span text:style-name="T19"><text:tab/><text:tab/>IDatabasable.</text:span><text:span text:style-name="T21">validate</text:span><text:span text:style-name="T19">(</text:span><text:span text:style-name="T18">this</text:span><text:span text:style-name="T19">);</text:span></text:p>
      <text:p text:style-name="P17"><text:tab/>}</text:p>
      <text:p text:style-name="P18"/>
      <text:p text:style-name="P12"><text:span text:style-name="T19"><text:tab/></text:span><text:span text:style-name="T30">@Override</text:span></text:p>
      <text:p text:style-name="P12"><text:span text:style-name="T19"><text:tab/></text:span><text:span text:style-name="T18">protected</text:span><text:span text:style-name="T19"> </text:span><text:span text:style-name="T18">void</text:span><text:span text:style-name="T19"> run() </text:span><text:span text:style-name="T18">throws</text:span><text:span text:style-name="T19"> Exception {</text:span></text:p>
      <text:p text:style-name="P12"><text:span text:style-name="T19"><text:tab/><text:tab/>DatabaseAccess </text:span><text:span text:style-name="T25">access</text:span><text:span text:style-name="T19"> = </text:span><text:span text:style-name="T18">new</text:span><text:span text:style-name="T19"> DatabaseAccess(</text:span><text:span text:style-name="T22">"mysql"</text:span><text:span text:style-name="T19">);</text:span></text:p>
      <text:p text:style-name="P12"><text:span text:style-name="T19"><text:tab/><text:tab/>Connection </text:span><text:span text:style-name="T25">conn</text:span><text:span text:style-name="T19"> = </text:span><text:span text:style-name="T25">access</text:span><text:span text:style-name="T19">.getConnection();</text:span></text:p>
      <text:p text:style-name="P19"><text:span text:style-name="T19"><text:tab/><text:tab/>PreparedStatement </text:span><text:span text:style-name="T25">pstmt</text:span><text:span text:style-name="T19"> = </text:span><text:span text:style-name="T25">conn</text:span><text:span text:style-name="T19">.prepareStatement(</text:span></text:p>
      <text:p text:style-name="P19"><text:span text:style-name="T19"><text:tab/><text:tab/><text:tab/></text:span><text:span text:style-name="T22">"SELECT * FROM time_zone_name"</text:span><text:span text:style-name="T19">);</text:span></text:p>
      <text:p text:style-name="P12"><text:span text:style-name="T19"><text:tab/><text:tab/>ResultSet </text:span><text:span text:style-name="T25">rs</text:span><text:span text:style-name="T19"> = </text:span><text:span text:style-name="T25">pstmt</text:span><text:span text:style-name="T19">.executeQuery();</text:span></text:p>
      <text:p text:style-name="P12"><text:span text:style-name="T19"><text:tab/><text:tab/></text:span><text:span text:style-name="T18">while</text:span><text:span text:style-name="T19"> (</text:span><text:span text:style-name="T25">rs</text:span><text:span text:style-name="T19">.next()) {</text:span></text:p>
      <text:p text:style-name="P12"><text:span text:style-name="T19"><text:tab/><text:tab/><text:tab/>System.</text:span><text:span text:style-name="T20">out</text:span><text:span text:style-name="T19">.println(</text:span><text:span text:style-name="T25">rs</text:span><text:span text:style-name="T19">.getString(1));</text:span></text:p>
      <text:p text:style-name="P17"><text:tab/><text:tab/>}</text:p>
      <text:p text:style-name="P12"><text:span text:style-name="T19"><text:tab/><text:tab/>DatabaseAccess.</text:span><text:span text:style-name="T21">destroy</text:span><text:span text:style-name="T19">(</text:span><text:span text:style-name="T25">conn</text:span><text:span text:style-name="T19">, </text:span><text:span text:style-name="T25">pstmt</text:span><text:span text:style-name="T19">, </text:span><text:span text:style-name="T25">rs</text:span><text:span text:style-name="T19">, </text:span><text:span text:style-name="T20">logger</text:span><text:span text:style-name="T19">);</text:span></text:p>
      <text:p text:style-name="P17"><text:tab/>}</text:p>
      <text:p text:style-name="P20"/>
      <text:h text:style-name="P21" text:outline-level="3">Summary</text:h>
      <text:p text:style-name="P22"><text:span text:style-name="T31">Following the spirit of the Keith framework, an enhancement should support a common feature using as little code as possible. In other words, abstract the concept as much as possible to allow programmers </text:span><text:span text:style-name="T32">creative </text:span><text:span text:style-name="T31">freedom. </text:span></text:p>
      <text:p text:style-name="P23"/>
      <text:p text:style-name="P23"><text:span text:style-name="T9">The I</text:span><text:span text:style-name="T33">Databas</text:span><text:span text:style-name="T9">able </text:span><text:span text:style-name="T34">enhancement</text:span><text:span text:style-name="T9"> makes decisions </text:span><text:span text:style-name="T35">for</text:span><text:span text:style-name="T9"> functionality, yet remain</text:span><text:span text:style-name="T35">s</text:span><text:span text:style-name="T9"> simple. For instance, </text:span><text:span text:style-name="T33">the primary concern for registering multiple databases is for the database ID (the value passed to the constructor) to be unique. Validation is embedded to insure compliance. Otherwise, all setup logic, including initializing the driver class, is performed by the enhancement. Additionally, the enhancement does not attempt to include connection pool logic, batch processes, or transactions. These features are typically specific to the individual job or preference for a 3</text:span><text:span text:style-name="T36">rd</text:span><text:span text:style-name="T33"> party API, and left untouched by this code.</text:span></text:p>
      <text:p text:style-name="P24"/>
      <text:p text:style-name="P25"><text:span text:style-name="T37">Possible enhancements may not be apparent at first, but as with other styles of applications, any time an operation is repeated in multiple a</text:span><text:span text:style-name="T32">utomated processes</text:span><text:span text:style-name="T37">, it may be useful to convert the operation to an API, </text:span><text:span text:style-name="T32">then adapt the API to be used as part of the Keith framewor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roman" style:font-pitch="variable"/>
    <style:font-face style:name="Noto Mono" svg:font-family="'Noto Mono'"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weight="bold" officeooo:rsid="0011328e" officeooo:paragraph-rsid="0011328e" style:font-weight-asian="bold" style:font-weight-complex="bold"/>
    </style:style>
    <style:style style:name="MP2" style:family="paragraph" style:parent-style-name="Footer">
      <style:paragraph-properties fo:text-align="center" style:justify-single-word="false"/>
    </style:style>
    <style:style style:name="MT1" style:family="text">
      <style:text-properties officeooo:rsid="00462219"/>
    </style:style>
    <style:style style:name="MT2" style:family="text">
      <style:text-properties officeooo:rsid="002ce32f"/>
    </style:style>
    <style:style style:name="MT3" style:family="text">
      <style:text-properties officeooo:rsid="004423f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Keith Framework - <text:span text:style-name="MT1">Databas</text:span><text:span text:style-name="MT2">able</text:span></text:p>
      </style:header>
      <style:footer>
        <text:p text:style-name="MP2"><text:page-number text:select-page="current">2</text:page-number><text:s/><text:span text:style-name="MT3">of </text:span><text:span text:style-name="MT3"><text:page-count>2</text:page-count></text:span></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09-17T23:37:32.862847224</meta:creation-date>
    <dc:date>2026-06-12T07:02:03.561559000</dc:date>
    <meta:editing-duration>PT9H33M50S</meta:editing-duration>
    <meta:editing-cycles>40</meta:editing-cycles>
    <meta:generator>LibreOffice/26.2.3.2$Windows_X86_64 LibreOffice_project/70e089b17412e4cb7773e41413306b17a2328c34</meta:generator>
    <meta:document-statistic meta:table-count="1" meta:image-count="1" meta:object-count="0" meta:page-count="2" meta:paragraph-count="48" meta:word-count="489" meta:character-count="3699" meta:non-whitespace-character-count="3211"/>
  </office:meta>
</office:document-meta>
</file>